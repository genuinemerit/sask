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800000330B18F566A.png" manifest:media-type="image/png"/>
  <manifest:file-entry manifest:full-path="Pictures/1000000100000478000003300F5DF33B.png" manifest:media-type="image/png"/>
  <manifest:file-entry manifest:full-path="Pictures/10000001000004780000033021AD05C4.png" manifest:media-type="image/png"/>
  <manifest:file-entry manifest:full-path="Pictures/1000000100000478000003307D74C7C0.png" manifest:media-type="image/png"/>
  <manifest:file-entry manifest:full-path="Pictures/10000001000006340000020FCCEED6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ff9" officeooo:paragraph-rsid="001f0ff9"/>
    </style:style>
    <style:style style:name="P2" style:family="paragraph" style:parent-style-name="Standard">
      <style:text-properties officeooo:rsid="0022825f" officeooo:paragraph-rsid="0022825f"/>
    </style:style>
    <style:style style:name="P3" style:family="paragraph" style:parent-style-name="Standard">
      <style:text-properties fo:font-weight="bold" officeooo:rsid="0020efa5" officeooo:paragraph-rsid="0020efa5" style:font-weight-asian="bold" style:font-weight-complex="bold"/>
    </style:style>
    <style:style style:name="P4" style:family="paragraph" style:parent-style-name="Standard">
      <style:text-properties officeooo:rsid="001f0ff9" officeooo:paragraph-rsid="001f0ff9"/>
    </style:style>
    <style:style style:name="P5" style:family="paragraph" style:parent-style-name="Standard">
      <style:text-properties officeooo:rsid="001f0ff9" officeooo:paragraph-rsid="00254dff"/>
    </style:style>
    <style:style style:name="P6" style:family="paragraph" style:parent-style-name="Standard">
      <style:text-properties officeooo:rsid="0022825f" officeooo:paragraph-rsid="002282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e: <text:s/>/docs/user_testing.md</text:p>
      <text:p text:style-name="P1"/>
      <text:p text:style-name="P1">~$ ssh -L 5000:localhost:5000 sask-dev</text:p>
      <text:p text:style-name="P1">Last login: Tue Jun <text:s/>2 21:49:11 2026 from 192.168.122.1</text:p>
      <text:p text:style-name="P1"/>
      <text:p text:style-name="P1">[dave@sask-dev:~]$ cd Code/sask-calendar</text:p>
      <text:p text:style-name="P1"/>
      <text:p text:style-name="P1">[dave@sask-dev:~/Code/sask-calendar]$ PYTHONPATH=src .venv/bin/flask --app sask.web run</text:p>
      <text:p text:style-name="P1"><text:s/>* Serving Flask app 'sask.web'</text:p>
      <text:p text:style-name="P1"><text:s/>* Debug mode: off</text:p>
      <text:p text:style-name="P1">WARNING: This is a development server. Do not use it in a production deployment. Use a production WSGI server instead.</text:p>
      <text:p text:style-name="P1"><text:s/>* Running on http://127.0.0.1:5000</text:p>
      <text:p text:style-name="P1">Press CTRL+C to quit</text:p>
      <text:p text:style-name="P1"/>
      <text:p text:style-name="P1"/>
      <text:p text:style-name="P1"/>
      <text:p text:style-name="P5">127.0.0.1 - - [02/Jun/2026 21:54:08] "GET / HTTP/1.1" 200 -</text:p>
      <text:p text:style-name="P5">127.0.0.1 - - [02/Jun/2026 21:54:08] "GET /favicon.ico HTTP/1.1" 404 -</text:p>
      <text:p text:style-name="P5">127.0.0.1 - - [02/Jun/2026 21:55:57] "GET /?pulse=71642553600 HTTP/1.1" 200 -</text:p>
      <text:p text:style-name="P5">127.0.0.1 - - [02/Jun/2026 21:58:50] "GET /?pulse=0 HTTP/1.1" 200 -</text:p>
      <text:p text:style-name="P5">127.0.0.1 - - [02/Jun/2026 22:02:00] "GET /?pulse=43200 HTTP/1.1" 200 -</text:p>
      <text:p text:style-name="P5">127.0.0.1 - - [02/Jun/2026 22:03:25] "GET /?pulse=43200.7 HTTP/1.1" 200 -</text:p>
      <text:p text:style-name="P5"/>
      <text:p text:style-name="P1"/>
      <text:p text:style-name="P1"><draw:frame draw:style-name="fr1" draw:name="Image1" text:anchor-type="char" svg:x="0.0102in" svg:y="0.1898in" svg:width="4.8937in" svg:height="1.6236in" draw:z-index="0"><draw:image xlink:href="Pictures/10000001000006340000020FCCEED6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0.4909in" svg:y="0.0465in" svg:width="3.6071in" svg:height="2.5728in" draw:z-index="1"><draw:image xlink:href="Pictures/1000000100000478000003307D74C7C0.png" xlink:type="simple" xlink:show="embed" xlink:actuate="onLoad" draw:mime-type="image/png"/></draw:frame><draw:frame draw:style-name="fr1" draw:name="Image3" text:anchor-type="char" svg:x="3.3846in" svg:y="0.0571in" svg:width="3.5264in" svg:height="2.5154in" draw:z-index="2"><draw:image xlink:href="Pictures/10000001000004780000033021AD05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1839in" svg:y="0.0311in" svg:width="3.4335in" svg:height="2.4484in" draw:z-index="3"><draw:image xlink:href="Pictures/1000000100000478000003300F5DF33B.png" xlink:type="simple" xlink:show="embed" xlink:actuate="onLoad" draw:mime-type="image/png"/></draw:frame><draw:frame draw:style-name="fr1" draw:name="Image5" text:anchor-type="char" svg:x="3.3008in" svg:y="0.0102in" svg:width="3.4811in" svg:height="2.4827in" draw:z-index="4"><draw:image xlink:href="Pictures/100000010000047800000330B18F566A.png" xlink:type="simple" xlink:show="embed" xlink:actuate="onLoad" draw:mime-type="image/png"/></draw:frame><text:soft-page-break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ote: <text:s/>Input field will not accept string input like “abc”. <text:s/>(satsifactory – better than an error msg)</text:p>
      <text:p text:style-name="P2"/>
      <text:p text:style-name="P2"/>
      <text:p text:style-name="P2">Source code review shows no JavaScript:</text:p>
      <text:p text:style-name="P2"/>
      <text:p text:style-name="P2">&lt;!doctype html&gt;</text:p>
      <text:p text:style-name="P2">&lt;html lang="en"&gt;</text:p>
      <text:p text:style-name="P2">&lt;head&gt;</text:p>
      <text:p text:style-name="P2"><text:s text:c="2"/>&lt;meta charset="utf-8"&gt;</text:p>
      <text:p text:style-name="P2"><text:s text:c="2"/>&lt;meta name="viewport" content="width=device-width, initial-scale=1"&gt;</text:p>
      <text:p text:style-name="P2"><text:s text:c="2"/>&lt;title&gt;Saskan Calendar — Pulse Lookup&lt;/title&gt;</text:p>
      <text:p text:style-name="P2"><text:s text:c="2"/>&lt;style&gt;</text:p>
      <text:p text:style-name="P2"><text:s text:c="4"/>body {</text:p>
      <text:p text:style-name="P2"><text:s text:c="6"/>font-family: sans-serif;</text:p>
      <text:p text:style-name="P2"><text:s text:c="6"/>max-width: 720px;</text:p>
      <text:p text:style-name="P2"><text:s text:c="6"/>margin: 2rem auto;</text:p>
      <text:p text:style-name="P2"><text:s text:c="6"/>padding: 0 1rem;</text:p>
      <text:p text:style-name="P2"><text:s text:c="6"/>color: #222;</text:p>
      <text:p text:style-name="P2"><text:s text:c="4"/>}</text:p>
      <text:p text:style-name="P2"><text:s text:c="4"/>h1 { font-size: 1.4rem; margin-bottom: 1.5rem; }</text:p>
      <text:p text:style-name="P2"><text:s text:c="4"/>label { display: block; margin-bottom: .3rem; font-weight: bold; }</text:p>
      <text:p text:style-name="P2"><text:s text:c="4"/>input[type=number] {</text:p>
      <text:p text:style-name="P2"><text:s text:c="6"/>width: 18rem;</text:p>
      <text:p text:style-name="P2"><text:s text:c="6"/>padding: .3rem .5rem;</text:p>
      <text:p text:style-name="P2"><text:s text:c="6"/>font-size: 1rem;</text:p>
      <text:p text:style-name="P2"><text:s text:c="6"/>border: 1px solid #aaa;</text:p>
      <text:p text:style-name="P2"><text:s text:c="6"/>border-radius: 3px;</text:p>
      <text:p text:style-name="P2"><text:s text:c="4"/>}</text:p>
      <text:p text:style-name="P2"><text:s text:c="4"/>button {</text:p>
      <text:p text:style-name="P2"><text:s text:c="6"/>margin-left: .5rem;</text:p>
      <text:p text:style-name="P2"><text:s text:c="6"/>padding: .3rem .9rem;</text:p>
      <text:p text:style-name="P2"><text:s text:c="6"/>font-size: 1rem;</text:p>
      <text:p text:style-name="P2"><text:s text:c="6"/>cursor: pointer;</text:p>
      <text:p text:style-name="P2"><text:s text:c="4"/>}</text:p>
      <text:p text:style-name="P2"><text:s text:c="4"/>table { border-collapse: collapse; margin-top: 1.5rem; }</text:p>
      <text:p text:style-name="P2"><text:soft-page-break/><text:s text:c="4"/>th, td { border: 1px solid #ccc; padding: .4rem .9rem; text-align: left; }</text:p>
      <text:p text:style-name="P2"><text:s text:c="4"/>th { background: #f4f4f4; white-space: nowrap; }</text:p>
      <text:p text:style-name="P2"><text:s text:c="4"/>.error { color: #c00; margin-top: .75rem; }</text:p>
      <text:p text:style-name="P2"><text:s text:c="2"/>&lt;/style&gt;</text:p>
      <text:p text:style-name="P2">&lt;/head&gt;</text:p>
      <text:p text:style-name="P2">&lt;body&gt;</text:p>
      <text:p text:style-name="P2"/>
      <text:p text:style-name="P2">&lt;h1&gt;Saskan Calendar — Pulse Lookup&lt;/h1&gt;</text:p>
      <text:p text:style-name="P2"/>
      <text:p text:style-name="P2">&lt;form method="get" action="/"&gt;</text:p>
      <text:p text:style-name="P2"><text:s text:c="2"/>&lt;label for="pulse"&gt;Pulse&lt;/label&gt;</text:p>
      <text:p text:style-name="P2"><text:s text:c="2"/>&lt;input type="number" id="pulse" name="pulse" step="any"</text:p>
      <text:p text:style-name="P2"><text:s text:c="9"/>value="43201"&gt;</text:p>
      <text:p text:style-name="P2"><text:s text:c="2"/>&lt;button type="submit"&gt;Query&lt;/button&gt;</text:p>
      <text:p text:style-name="P2">&lt;/form&gt;</text:p>
      <text:p text:style-name="P2"/>
      <text:p text:style-name="P2"/>
      <text:p text:style-name="P2"/>
      <text:p text:style-name="P2"/>
      <text:p text:style-name="P2"><text:s text:c="2"/>&lt;table&gt;</text:p>
      <text:p text:style-name="P2"><text:s text:c="4"/>&lt;tr&gt;&lt;th&gt;Pulse&lt;/th&gt; <text:s text:c="13"/>&lt;td&gt;43201&lt;/td&gt;&lt;/tr&gt;</text:p>
      <text:p text:style-name="P2"><text:s text:c="4"/>&lt;tr&gt;&lt;th&gt;Astro Day&lt;/th&gt; <text:s text:c="9"/>&lt;td&gt;1&lt;/td&gt;&lt;/tr&gt;</text:p>
      <text:p text:style-name="P2"><text:s text:c="4"/>&lt;tr&gt;&lt;th&gt;Day Pulse Offset&lt;/th&gt; <text:s text:c="2"/>&lt;td&gt;43201</text:p>
      <text:p text:style-name="P2"><text:s text:c="40"/>(12:00:01 Astro time)&lt;/td&gt;&lt;/tr&gt;</text:p>
      <text:p text:style-name="P2"><text:s text:c="4"/>&lt;tr&gt;&lt;th&gt;Orbital Position&lt;/th&gt; <text:s text:c="2"/>&lt;td&gt;0.1369% of AstroYear&lt;/td&gt;&lt;/tr&gt;</text:p>
      <text:p text:style-name="P2"><text:s text:c="2"/>&lt;/table&gt;</text:p>
      <text:p text:style-name="P2"/>
      <text:p text:style-name="P2"/>
      <text:p text:style-name="P2">&lt;/body&gt;</text:p>
      <text:p text:style-name="P2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2T21:51:41.655370710</meta:creation-date>
    <dc:date>2026-06-02T22:10:06.835754875</dc:date>
    <meta:editing-duration>PT17M35S</meta:editing-duration>
    <meta:editing-cycles>4</meta:editing-cycles>
    <meta:generator>LibreOffice/24.2.7.2$Linux_X86_64 LibreOffice_project/420$Build-2</meta:generator>
    <meta:document-statistic meta:table-count="0" meta:image-count="5" meta:object-count="0" meta:page-count="5" meta:paragraph-count="70" meta:word-count="296" meta:character-count="2545" meta:non-whitespace-character-count="2067"/>
  </office:meta>
</office:document-meta>
</file>